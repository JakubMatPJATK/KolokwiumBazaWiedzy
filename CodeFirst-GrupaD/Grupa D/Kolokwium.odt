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C0000017182A75A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8pt" style:font-size-asian="8pt" style:font-size-complex="8pt"/>
    </style:style>
    <style:style style:name="P2" style:family="paragraph" style:parent-style-name="Heading_20_2">
      <style:paragraph-properties fo:text-align="left" style:justify-single-word="false"/>
      <style:text-properties officeooo:paragraph-rsid="002ebe48"/>
    </style:style>
    <style:style style:name="P3" style:family="paragraph" style:parent-style-name="Text_20_body">
      <style:text-properties officeooo:rsid="001592e9" officeooo:paragraph-rsid="001592e9"/>
    </style:style>
    <style:style style:name="P4" style:family="paragraph" style:parent-style-name="Standard">
      <style:text-properties officeooo:rsid="0012f15e" officeooo:paragraph-rsid="0012f15e"/>
    </style:style>
    <style:style style:name="P5" style:family="paragraph" style:parent-style-name="Standard">
      <style:text-properties fo:font-weight="bold" officeooo:rsid="001cbede" officeooo:paragraph-rsid="001cbede" style:font-weight-asian="bold" style:font-weight-complex="bold"/>
    </style:style>
    <style:style style:name="P6" style:family="paragraph" style:parent-style-name="Standard">
      <style:text-properties fo:font-weight="normal" officeooo:rsid="001cbede" officeooo:paragraph-rsid="002480c1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cbede" officeooo:paragraph-rsid="002480c1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480c1" officeooo:paragraph-rsid="002480c1" style:font-weight-asian="normal" style:font-weight-complex="normal"/>
    </style:style>
    <style:style style:name="P9" style:family="paragraph" style:parent-style-name="Standard">
      <style:text-properties fo:font-weight="bold" officeooo:rsid="0012f15e" officeooo:paragraph-rsid="0012f15e" style:font-weight-asian="bold" style:font-weight-complex="bold"/>
    </style:style>
    <style:style style:name="P10" style:family="paragraph" style:parent-style-name="Standard">
      <style:text-properties fo:font-size="12pt" officeooo:rsid="0013b28a" officeooo:paragraph-rsid="002775e8" style:font-size-asian="12pt" style:font-size-complex="12pt"/>
    </style:style>
    <style:style style:name="P11" style:family="paragraph" style:parent-style-name="Standard">
      <style:text-properties fo:font-size="12pt" officeooo:rsid="002775e8" officeooo:paragraph-rsid="002775e8" style:font-size-asian="12pt" style:font-size-complex="12pt"/>
    </style:style>
    <style:style style:name="P12" style:family="paragraph" style:parent-style-name="Standard">
      <style:text-properties fo:font-size="12pt" officeooo:rsid="0013b28a" officeooo:paragraph-rsid="0037b901" style:font-size-asian="12pt" style:font-size-complex="12pt"/>
    </style:style>
    <style:style style:name="P13" style:family="paragraph" style:parent-style-name="Standard">
      <style:text-properties fo:font-size="12pt" officeooo:rsid="0013b28a" officeooo:paragraph-rsid="0012f15e" style:font-size-asian="12pt" style:font-size-complex="12pt"/>
    </style:style>
    <style:style style:name="P14" style:family="paragraph" style:parent-style-name="Standard">
      <style:text-properties fo:font-weight="bold" officeooo:rsid="0013b28a" officeooo:paragraph-rsid="0012f15e" fo:background-color="transparent" style:font-weight-asian="bold" style:font-weight-complex="bold"/>
    </style:style>
    <style:style style:name="P15" style:family="paragraph" style:parent-style-name="Standard">
      <style:text-properties fo:font-weight="bold" officeooo:rsid="0013b28a" officeooo:paragraph-rsid="0013b28a" fo:background-color="transparent" style:font-weight-asian="bold" style:font-weight-complex="bold"/>
    </style:style>
    <style:style style:name="P16" style:family="paragraph" style:parent-style-name="Standard">
      <style:text-properties fo:font-weight="normal" officeooo:rsid="0013b28a" officeooo:paragraph-rsid="0013b28a" fo:background-color="transparent" style:font-weight-asian="normal" style:font-weight-complex="normal"/>
    </style:style>
    <style:style style:name="P17" style:family="paragraph" style:parent-style-name="Standard">
      <style:text-properties officeooo:rsid="0013b28a" officeooo:paragraph-rsid="0013b28a"/>
    </style:style>
    <style:style style:name="P18" style:family="paragraph" style:parent-style-name="Standard">
      <style:text-properties fo:font-weight="normal" officeooo:rsid="0013b28a" officeooo:paragraph-rsid="0013b28a" fo:background-color="#cccccc" style:font-weight-asian="normal" style:font-weight-complex="normal"/>
    </style:style>
    <style:style style:name="P19" style:family="paragraph" style:parent-style-name="Heading_20_1">
      <style:text-properties officeooo:rsid="001f0ae1" officeooo:paragraph-rsid="001f0ae1"/>
    </style:style>
    <style:style style:name="P20" style:family="paragraph" style:parent-style-name="Text_20_body" style:list-style-name="L2">
      <style:text-properties officeooo:rsid="001f0ae1" officeooo:paragraph-rsid="001f0ae1"/>
    </style:style>
    <style:style style:name="P21" style:family="paragraph" style:parent-style-name="Text_20_body">
      <style:text-properties officeooo:rsid="0031554e" officeooo:paragraph-rsid="0031554e"/>
    </style:style>
    <style:style style:name="P22" style:family="paragraph" style:parent-style-name="Text_20_body" style:list-style-name="L3">
      <style:text-properties officeooo:rsid="0031554e" officeooo:paragraph-rsid="0031554e"/>
    </style:style>
    <style:style style:name="P23" style:family="paragraph" style:parent-style-name="Text_20_body">
      <style:text-properties fo:font-weight="bold" officeooo:rsid="001b80ab" officeooo:paragraph-rsid="001b80ab" style:font-weight-asian="bold" style:font-weight-complex="bold"/>
    </style:style>
    <style:style style:name="P24" style:family="paragraph" style:parent-style-name="Text_20_body" style:list-style-name="L4">
      <style:text-properties officeooo:rsid="001b80ab" officeooo:paragraph-rsid="001b80ab"/>
    </style:style>
    <style:style style:name="P25" style:family="paragraph" style:parent-style-name="Text_20_body" style:list-style-name="L4">
      <style:text-properties officeooo:rsid="002d06dd" officeooo:paragraph-rsid="002d06dd"/>
    </style:style>
    <style:style style:name="P26" style:family="paragraph" style:parent-style-name="Text_20_body" style:list-style-name="L5">
      <style:text-properties officeooo:rsid="001b80ab" officeooo:paragraph-rsid="001b80ab"/>
    </style:style>
    <style:style style:name="P27" style:family="paragraph" style:parent-style-name="Text_20_body">
      <style:text-properties fo:font-weight="bold" officeooo:rsid="001e9546" officeooo:paragraph-rsid="001e9546" style:font-weight-asian="bold" style:font-weight-complex="bold"/>
    </style:style>
    <style:style style:name="T1" style:family="text">
      <style:text-properties officeooo:rsid="001cbede"/>
    </style:style>
    <style:style style:name="T2" style:family="text">
      <style:text-properties officeooo:rsid="00230cb8"/>
    </style:style>
    <style:style style:name="T3" style:family="text">
      <style:text-properties officeooo:rsid="0013b28a"/>
    </style:style>
    <style:style style:name="T4" style:family="text">
      <style:text-properties officeooo:rsid="003df0fe"/>
    </style:style>
    <style:style style:name="T5" style:family="text">
      <style:text-properties fo:background-color="#dddddd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1adfe9" fo:background-color="#ffffff" loext:char-shading-value="0"/>
    </style:style>
    <style:style style:name="T8" style:family="text">
      <style:text-properties style:text-underline-style="solid" style:text-underline-width="auto" style:text-underline-color="font-color" officeooo:rsid="002480c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775e8" style:font-weight-asian="bold" style:font-weight-complex="bold"/>
    </style:style>
    <style:style style:name="T12" style:family="text">
      <style:text-properties fo:background-color="#cccccc" loext:char-shading-value="0"/>
    </style:style>
    <style:style style:name="T13" style:family="text">
      <style:text-properties style:text-underline-style="solid" style:text-underline-width="auto" style:text-underline-color="font-color" officeooo:rsid="001cbede"/>
    </style:style>
    <style:style style:name="T14" style:family="text">
      <style:text-properties fo:font-weight="normal" fo:background-color="transparent" loext:char-shading-value="0" style:font-weight-asian="normal" style:font-weight-complex="normal"/>
    </style:style>
    <style:style style:name="T15" style:family="text">
      <style:text-properties fo:font-weight="normal" fo:background-color="#cccccc" loext:char-shading-value="0" style:font-weight-asian="normal" style:font-weight-complex="normal"/>
    </style:style>
    <style:style style:name="T16" style:family="text">
      <style:text-properties officeooo:rsid="002264f0"/>
    </style:style>
    <style:style style:name="T17" style:family="text">
      <style:text-properties officeooo:rsid="002b33d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JATK APBD 2026</text:h>
      <text:h text:style-name="P2" text:outline-level="2">Kolokwium <text:span text:style-name="T1">EFCore </text:span><text:span text:style-name="T2">CodeFirst</text:span> <text:span text:style-name="T3">Gr. </text:span><text:span text:style-name="T4">D</text:span></text:h>
      <text:p text:style-name="P3">Czas: 1h25m</text:p>
      <text:p text:style-name="P4">W oparciu o załączony diagram <text:span text:style-name="T5">ERD</text:span><text:span text:style-name="T6"> </text:span><text:span text:style-name="T7">utwórz aplikację WebApi i</text:span><text:span text:style-name="T6"> rozwiąż poniższe zadania.</text:span></text:p>
      <text:p text:style-name="P5"/>
      <text:p text:style-name="P5"><draw:frame draw:style-name="fr1" draw:name="Image1" text:anchor-type="char" svg:width="6.1374in" svg:height="2.6335in" draw:z-index="0"><draw:image xlink:href="Pictures/100000010000035C0000017182A75AAC.png" xlink:type="simple" xlink:show="embed" xlink:actuate="onLoad" draw:mime-type="image/png"/></draw:frame>Zad1.</text:p>
      <text:p text:style-name="P6">Utwórz kontekst Entity Framework Core korzystając z podejścia <text:span text:style-name="T8">Code</text:span><text:span text:style-name="T9"> First</text:span>.</text:p>
      <text:list text:style-name="L1">
        <text:list-item>
          <text:p text:style-name="P7">Modele wydziel do katalogu <text:span text:style-name="T5">Entities</text:span>.</text:p>
        </text:list-item>
        <text:list-item>
          <text:p text:style-name="P8">Kontekst bazy zapisz w katalogu <text:span text:style-name="T5">Data</text:span>.</text:p>
        </text:list-item>
        <text:list-item>
          <text:p text:style-name="P8">Migracje zapisz do katalogu <text:span text:style-name="T5">Migrations</text:span>.</text:p>
        </text:list-item>
      </text:list>
      <text:p text:style-name="P9"/>
      <text:p text:style-name="P9">Zad<text:span text:style-name="T1">2</text:span>.</text:p>
      <text:p text:style-name="P10">Przygotuj końcówkę <text:span text:style-name="T10">/api/guests</text:span> odpowiadającej na zapytania <text:span text:style-name="T10">HTTP GET</text:span>. Końcówka powinna zwrócić dane na temat wszystkich obecnych w bazie danych gości i przypisanych do nich rezerwacji.</text:p>
      <text:p text:style-name="P10"/>
      <text:p text:style-name="P11">Dodatkowo końcówka powinna obsługiwać opcjonalne parametry:</text:p>
      <text:p text:style-name="P12"><text:span text:style-name="T11">lastName -</text:span> filtrowanie kolekcji wynikowej na podstawie nazwiska gościa.</text:p>
      <text:p text:style-name="P13"/>
      <text:p text:style-name="P13">Przykład zapytania:</text:p>
      <text:p text:style-name="P13"><text:span text:style-name="T10">GET</text:span> /api/guests</text:p>
      <text:p text:style-name="P13"><text:span text:style-name="T10">GET</text:span> /api/guests?lastName=Smi</text:p>
      <text:p text:style-name="P13"><text:span text:style-name="T10">GET</text:span> /api/guests?lastName=Smith</text:p>
      <text:p text:style-name="P4"/>
      <text:p text:style-name="P4"><text:span text:style-name="T3">Wymagany format odpowiedzi</text:span> znajdziesz w pliku <text:span text:style-name="T12">GET.json</text:span></text:p>
      <text:p text:style-name="P14"/>
      <text:p text:style-name="P15">Zad<text:span text:style-name="T1">3</text:span>.</text:p>
      <text:p text:style-name="P16">Przygotuj końcówkę <text:span text:style-name="T10">/api/guests</text:span> odpowiadającą na zapytania <text:span text:style-name="T10">HTTP POST</text:span>. Końcówka powinna umożliwić na dodanie nowego gościa do bazy danych, wraz z przypisaniem do niego nowej rezerwacji.</text:p>
      <text:p text:style-name="P16">Operacja powinna zostać przerwana, gdy pokój o podanym ID nie istnieje w bazie danych, oraz jeśli data zameldowania jest późniejsza niż data wymeldowania.</text:p>
      <text:p text:style-name="P16"/>
      <text:p text:style-name="P16">Operacja <text:span text:style-name="T13">musi</text:span> zostać wykonana w ramach jednej <text:span text:style-name="T10">transakcji</text:span>.</text:p>
      <text:p text:style-name="P16"/>
      <text:p text:style-name="P17"><text:span text:style-name="T14">Wymagany format przesyłanych danych znajdziesz w pliku </text:span><text:span text:style-name="T15">POST.json</text:span></text:p>
      <text:p text:style-name="P18"><text:soft-page-break/></text:p>
      <text:h text:style-name="P19" text:outline-level="1" text:is-list-header="true">Pamiętaj o:</text:h>
      <text:list text:style-name="L2">
        <text:list-item>
          <text:p text:style-name="P20">Założeniu transakcji, jeżeli jest to <text:span text:style-name="T16">potrzebne</text:span>,</text:p>
        </text:list-item>
        <text:list-item>
          <text:p text:style-name="P20">Walidowaniu danych wysyłanych do serwera w przypadku końcówek typu POST oraz PUT,</text:p>
        </text:list-item>
        <text:list-item>
          <text:p text:style-name="P20">Zwracaniu odpowiednich kodów HTTP z czytelnymi wiadomościami,</text:p>
        </text:list-item>
        <text:list-item>
          <text:p text:style-name="P20">Odpowiedniej konwencji nazewnictwa dla wszystkich obiektów,</text:p>
        </text:list-item>
        <text:list-item>
          <text:p text:style-name="P20">Wysłaniu wszystkich kluczowych plików do repozytorium <text:span text:style-name="T17">(w tym folderu z Migracjami)</text:span></text:p>
        </text:list-item>
      </text:list>
      <text:h text:style-name="Heading_20_1" text:outline-level="1">Punktacja</text:h>
      <text:p text:style-name="P21">Za kolokwium można uzyskać 30 punktów łącznie:</text:p>
      <text:list text:style-name="L3">
        <text:list-item>
          <text:p text:style-name="P22">10 punktów za każdą z końcówek,</text:p>
        </text:list-item>
        <text:list-item>
          <text:p text:style-name="P22">10 punktów za poprawnie utworzony i skonfigurowany kontekst bazy danych.</text:p>
        </text:list-item>
      </text:list>
      <text:p text:style-name="P23">Punkty mogą być odjęte za:</text:p>
      <text:list text:style-name="L4">
        <text:list-item>
          <text:p text:style-name="P24">Korzystanie z niepoprawnej konwencji nazewnictwa, nieczytelne nazwy zmiennych lub nieporządek w kodzie: do -4 pkt,</text:p>
        </text:list-item>
        <text:list-item>
          <text:p text:style-name="P24">Niepoprawne kody odpowiedzi HTTP: do -5 pkt,</text:p>
        </text:list-item>
        <text:list-item>
          <text:p text:style-name="P24">Brak wydzielenia komunikacji bazy danych do oddzielnej warstwy: do -10 pkt,</text:p>
        </text:list-item>
        <text:list-item>
          <text:p text:style-name="P24">Brak wstrzykiwania zależności: do -5 pkt,</text:p>
        </text:list-item>
        <text:list-item>
          <text:p text:style-name="P24">Brak pliku .gitignore lub niepotrzebne pliki w repozytorium (bin, obj): - 50%</text:p>
        </text:list-item>
        <text:list-item>
          <text:p text:style-name="P24">Pisanie kodu komunkującego się z bazą danych w sposób synchroniczny: do -5 pkt</text:p>
        </text:list-item>
        <text:list-item>
          <text:p text:style-name="P25">Brak folderu z migracjami w repozytorium: -5 pkt</text:p>
        </text:list-item>
      </text:list>
      <text:h text:style-name="Heading_20_1" text:outline-level="1">Uwagi</text:h>
      <text:list text:style-name="L5">
        <text:list-item>
          <text:p text:style-name="P26">Program, który się nie kompiluje – wyzerowane kolokwium</text:p>
        </text:list-item>
        <text:list-item>
          <text:p text:style-name="P26">Program, który nie jest w repozytorium Github - wyzerowane kolokwium</text:p>
        </text:list-item>
        <text:list-item>
          <text:p text:style-name="P26">Program, który jest plagiatem - 2 na koniec,</text:p>
        </text:list-item>
      </text:list>
      <text:p text:style-name="P23">Korzystanie z narzędzi AI lub niesamodzielne rozwiązywanie zadań podczas kolokwium skutkuje niezaliczeniem przedmiotu.</text:p>
      <text:p text:style-name="P27">Wykrycie wysłania treści kolokwium poza grupę skutkuje niezaliczeniem przedmiotu nadawcy oraz wszystkich odbiorców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6:41:25.752389192</meta:creation-date>
    <dc:date>2026-05-27T17:23:00.114954587</dc:date>
    <meta:editing-duration>PT1H20M6S</meta:editing-duration>
    <meta:editing-cycles>38</meta:editing-cycles>
    <meta:generator>LibreOffice/26.2.3.2$Linux_X86_64 LibreOffice_project/7d74455cffae7a589951233f185ae0303c082020</meta:generator>
    <meta:print-date>2026-05-27T17:14:12.789284006</meta:print-date>
    <meta:printed-by>PDF files</meta:printed-by>
    <meta:document-statistic meta:table-count="0" meta:image-count="1" meta:object-count="0" meta:page-count="2" meta:paragraph-count="47" meta:word-count="388" meta:character-count="2687" meta:non-whitespace-character-count="2365"/>
  </office:meta>
</office:document-meta>
</file>